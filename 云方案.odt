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6pt" officeooo:rsid="00039b79" officeooo:paragraph-rsid="00039b79" style:font-size-asian="14pt" style:font-size-complex="16pt"/>
    </style:style>
    <style:style style:name="P2" style:family="paragraph" style:parent-style-name="Standard">
      <style:text-properties fo:font-size="16pt" officeooo:rsid="00039b79" officeooo:paragraph-rsid="00041f63" style:font-size-asian="14pt" style:font-size-complex="16pt"/>
    </style:style>
    <style:style style:name="P3" style:family="paragraph" style:parent-style-name="Standard">
      <style:text-properties fo:font-size="16pt" officeooo:rsid="00039b79" officeooo:paragraph-rsid="001086e8" style:font-size-asian="14pt" style:font-size-complex="16pt"/>
    </style:style>
    <style:style style:name="P4" style:family="paragraph" style:parent-style-name="Standard">
      <style:text-properties fo:font-size="16pt" officeooo:rsid="00039b79" officeooo:paragraph-rsid="0012290f" style:font-size-asian="14pt" style:font-size-complex="16pt"/>
    </style:style>
    <style:style style:name="P5" style:family="paragraph" style:parent-style-name="Table_20_Contents">
      <style:text-properties fo:font-size="16pt" style:font-size-asian="14pt" style:font-size-complex="16pt"/>
    </style:style>
    <style:style style:name="P6" style:family="paragraph" style:parent-style-name="Table_20_Contents">
      <style:text-properties fo:font-size="16pt" officeooo:paragraph-rsid="0012290f" style:font-size-asian="14pt" style:font-size-complex="16pt"/>
    </style:style>
    <style:style style:name="T1" style:family="text">
      <style:text-properties officeooo:rsid="000f4314"/>
    </style:style>
    <style:style style:name="T2" style:family="text">
      <style:text-properties officeooo:rsid="0014ef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T1500 服务器<text:span text:style-name="T2">3</text:span>台(缺一)</text:p>
      <text:p text:style-name="P1">操作系统：centos7</text:p>
      <text:p text:style-name="P1">用户：root</text:p>
      <text:p text:style-name="P1">密码：123123</text:p>
      <text:p text:style-name="P1"/>
      <text:p text:style-name="P2">交换机console密码linux123</text:p>
      <text:p text:style-name="P1">网络配置</text:p>
      <text:p text:style-name="P3">enp4s0f0灰色</text:p>
      <text:p text:style-name="P3">enp4s0f1留空</text:p>
      <text:p text:style-name="P3">enp4s0f2蓝色</text:p>
      <text:p text:style-name="P3">enp4s0f3白色</text:p>
      <text:p text:style-name="P1"/>
      <text:p text:style-name="P1">公网（灰色）：192.168.<text:span text:style-name="T1">10</text:span>0.5，192.168.<text:span text:style-name="T1">10</text:span>0.6，192.168.<text:span text:style-name="T1">10</text:span>0.7，192.168.<text:span text:style-name="T1">10</text:span>0.8</text:p>
      <text:p text:style-name="P1">内网（蓝色）：10.1.2.5，10.1.2.6，10.1.2.7，10.1.2.8</text:p>
      <text:p text:style-name="P1">虚拟（白色）：172.17.3.5，172.17.3.6，172.17.3.7，172.17.3.8</text:p>
      <text:p text:style-name="P1"/>
      <text:p text:style-name="P1">意外收获：1台</text:p>
      <text:p text:style-name="P1">公网192.168.100.1</text:p>
      <text:p text:style-name="P1">内网10.1.2.1</text:p>
      <text:p text:style-name="P1">虚拟172.17.3.1</text:p>
      <text:p text:style-name="P1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5">节点</text:p>
          </table:table-cell>
          <table:table-cell table:style-name="Table1.A1" office:value-type="string">
            <text:p text:style-name="P5">公网</text:p>
          </table:table-cell>
          <table:table-cell table:style-name="Table1.A1" office:value-type="string">
            <text:p text:style-name="P5">内网</text:p>
          </table:table-cell>
          <table:table-cell table:style-name="Table1.D1" office:value-type="string">
            <text:p text:style-name="P5">虚拟网</text:p>
          </table:table-cell>
        </table:table-row>
        <table:table-row>
          <table:table-cell table:style-name="Table1.A2" office:value-type="string">
            <text:p text:style-name="P6">controller</text:p>
          </table:table-cell>
          <table:table-cell table:style-name="Table1.A2" office:value-type="string">
            <text:p text:style-name="P5">192.168.100.1</text:p>
          </table:table-cell>
          <table:table-cell table:style-name="Table1.A2" office:value-type="string">
            <text:p text:style-name="P5">10.1.2.1</text:p>
          </table:table-cell>
          <table:table-cell table:style-name="Table1.D2" office:value-type="string">
            <text:p text:style-name="P4">172.17.3.1</text:p>
          </table:table-cell>
        </table:table-row>
        <table:table-row>
          <table:table-cell table:style-name="Table1.A2" office:value-type="string">
            <text:p text:style-name="P5">compute1</text:p>
          </table:table-cell>
          <table:table-cell table:style-name="Table1.A2" office:value-type="string">
            <text:p text:style-name="P4">192.168.<text:span text:style-name="T1">10</text:span>0.5</text:p>
          </table:table-cell>
          <table:table-cell table:style-name="Table1.A2" office:value-type="string">
            <text:p text:style-name="P4">10.1.2.5</text:p>
          </table:table-cell>
          <table:table-cell table:style-name="Table1.D2" office:value-type="string">
            <text:p text:style-name="P4">172.17.3.5</text:p>
          </table:table-cell>
        </table:table-row>
        <table:table-row>
          <table:table-cell table:style-name="Table1.A2" office:value-type="string">
            <text:p text:style-name="P5">compute2</text:p>
          </table:table-cell>
          <table:table-cell table:style-name="Table1.A2" office:value-type="string">
            <text:p text:style-name="P4">192.168.<text:span text:style-name="T1">10</text:span>0.6</text:p>
          </table:table-cell>
          <table:table-cell table:style-name="Table1.A2" office:value-type="string">
            <text:p text:style-name="P4">10.1.2.6</text:p>
          </table:table-cell>
          <table:table-cell table:style-name="Table1.D2" office:value-type="string">
            <text:p text:style-name="P4">172.17.3.6</text:p>
          </table:table-cell>
        </table:table-row>
        <table:table-row>
          <table:table-cell table:style-name="Table1.A2" office:value-type="string">
            <text:p text:style-name="P5">network</text:p>
          </table:table-cell>
          <table:table-cell table:style-name="Table1.A2" office:value-type="string">
            <text:p text:style-name="P4">192.168.<text:span text:style-name="T1">10</text:span>0.7</text:p>
          </table:table-cell>
          <table:table-cell table:style-name="Table1.A2" office:value-type="string">
            <text:p text:style-name="P4">10.1.2.7</text:p>
          </table:table-cell>
          <table:table-cell table:style-name="Table1.D2" office:value-type="string">
            <text:p text:style-name="P4">172.17.3.7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驿点阵正黑" style:font-family-asian="文泉驿点阵正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08:47:20.890662767</meta:creation-date>
    <dc:date>2016-06-23T08:58:13.813880066</dc:date>
    <meta:editing-duration>PT7H41M27S</meta:editing-duration>
    <meta:editing-cycles>15</meta:editing-cycles>
    <meta:generator>LibreOffice/4.3.7.2$Linux_X86_64 LibreOffice_project/430$Build-2</meta:generator>
    <meta:document-statistic meta:table-count="1" meta:image-count="0" meta:object-count="0" meta:page-count="1" meta:paragraph-count="37" meta:word-count="130" meta:character-count="472" meta:non-whitespace-character-count="471"/>
  </office:meta>
</office:document-meta>
</file>